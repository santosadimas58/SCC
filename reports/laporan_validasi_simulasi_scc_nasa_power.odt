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1653in" table:align="left"/>
    </style:style>
    <style:style style:name="Table1.A" style:family="table-column">
      <style:table-column-properties style:column-width="1.5174in"/>
    </style:style>
    <style:style style:name="Table1.B" style:family="table-column">
      <style:table-column-properties style:column-width="5.6479in"/>
    </style:style>
    <style:style style:name="Table1.A1" style:family="table-cell">
      <style:table-cell-properties style:vertical-align="middle" fo:padding="0.0194in" fo:border="none"/>
    </style:style>
    <style:style style:name="Table2" style:family="table">
      <style:table-properties style:width="7.1653in" table:align="left"/>
    </style:style>
    <style:style style:name="Table2.A" style:family="table-column">
      <style:table-column-properties style:column-width="0.2778in"/>
    </style:style>
    <style:style style:name="Table2.B" style:family="table-column">
      <style:table-column-properties style:column-width="1.4493in"/>
    </style:style>
    <style:style style:name="Table2.C" style:family="table-column">
      <style:table-column-properties style:column-width="1.4785in"/>
    </style:style>
    <style:style style:name="Table2.D" style:family="table-column">
      <style:table-column-properties style:column-width="0.5917in"/>
    </style:style>
    <style:style style:name="Table2.E" style:family="table-column">
      <style:table-column-properties style:column-width="1.1007in"/>
    </style:style>
    <style:style style:name="Table2.F" style:family="table-column">
      <style:table-column-properties style:column-width="0.5444in"/>
    </style:style>
    <style:style style:name="Table2.H" style:family="table-column">
      <style:table-column-properties style:column-width="1.1785in"/>
    </style:style>
    <style:style style:name="Table2.A1" style:family="table-cell">
      <style:table-cell-properties style:vertical-align="middle" fo:padding="0.0194in" fo:border="none"/>
    </style:style>
    <style:style style:name="Table3" style:family="table">
      <style:table-properties style:width="7.1653in" table:align="left"/>
    </style:style>
    <style:style style:name="Table3.A" style:family="table-column">
      <style:table-column-properties style:column-width="0.2778in"/>
    </style:style>
    <style:style style:name="Table3.B" style:family="table-column">
      <style:table-column-properties style:column-width="1.8569in"/>
    </style:style>
    <style:style style:name="Table3.C" style:family="table-column">
      <style:table-column-properties style:column-width="1.1958in"/>
    </style:style>
    <style:style style:name="Table3.D" style:family="table-column">
      <style:table-column-properties style:column-width="3.8347in"/>
    </style:style>
    <style:style style:name="Table3.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poran Perbandingan Simulasi SCC dengan Data Irradiance NASA POWER</text:p>
      <text:p text:style-name="Body_20_Text.meta">Lokasi simulasi: Setiabudhi/Bandung sekitar latitude -6.86 dan longitude 107.59. Data project diambil dari tabel <text:span text:style-name="Source_20_Text">scc_data</text:span>. Data pembanding memakai NASA POWER Hourly API parameter <text:span text:style-name="Source_20_Text">ALLSKY_SFC_SW_DWN</text:span>, <text:span text:style-name="Source_20_Text">CLOUD_AMT</text:span>, dan <text:span text:style-name="Source_20_Text">T2M</text:span>.</text:p>
      <text:h text:style-name="Heading_20_2" text:outline-level="2">Ringkasan</text:h>
      <table:table table:name="Table1" table:style-name="Table1">
        <table:table-column table:style-name="Table1.A"/>
        <table:table-column table:style-name="Table1.B"/>
        <table:table-row>
          <table:table-cell table:style-name="Table1.A1" office:value-type="string">
            <text:p text:style-name="Table_20_Heading">Jumlah record SCC</text:p>
          </table:table-cell>
          <table:table-cell table:style-name="Table1.A1" office:value-type="string">
            <text:p text:style-name="Table_20_Contents">162 record</text:p>
          </table:table-cell>
        </table:table-row>
        <table:table-row>
          <table:table-cell table:style-name="Table1.A1" office:value-type="string">
            <text:p text:style-name="Table_20_Heading">Jumlah agregasi per jam</text:p>
          </table:table-cell>
          <table:table-cell table:style-name="Table1.A1" office:value-type="string">
            <text:p text:style-name="Table_20_Contents">4 jam</text:p>
          </table:table-cell>
        </table:table-row>
        <table:table-row>
          <table:table-cell table:style-name="Table1.A1" office:value-type="string">
            <text:p text:style-name="Table_20_Heading">Rentang data project</text:p>
          </table:table-cell>
          <table:table-cell table:style-name="Table1.A1" office:value-type="string">
            <text:p text:style-name="Table_20_Contents">12 May 2026 05:00 WIB sampai 15 May 2026 03:00 WIB</text:p>
          </table:table-cell>
        </table:table-row>
        <table:table-row>
          <table:table-cell table:style-name="Table1.A1" office:value-type="string">
            <text:p text:style-name="Table_20_Heading">Rata-rata daya panel simulasi</text:p>
          </table:table-cell>
          <table:table-cell table:style-name="Table1.A1" office:value-type="string">
            <text:p text:style-name="Table_20_Contents">38.31 W</text:p>
          </table:table-cell>
        </table:table-row>
        <table:table-row>
          <table:table-cell table:style-name="Table1.A1" office:value-type="string">
            <text:p text:style-name="Table_20_Heading">Maksimum daya panel simulasi</text:p>
          </table:table-cell>
          <table:table-cell table:style-name="Table1.A1" office:value-type="string">
            <text:p text:style-name="Table_20_Contents">43.89 W</text:p>
          </table:table-cell>
        </table:table-row>
        <table:table-row>
          <table:table-cell table:style-name="Table1.A1" office:value-type="string">
            <text:p text:style-name="Table_20_Heading">Rata-rata irradiance NASA referensi</text:p>
          </table:table-cell>
          <table:table-cell table:style-name="Table1.A1" office:value-type="string">
            <text:p text:style-name="Table_20_Contents">12.51 Wh/m² per jam</text:p>
          </table:table-cell>
        </table:table-row>
        <table:table-row>
          <table:table-cell table:style-name="Table1.A1" office:value-type="string">
            <text:p text:style-name="Table_20_Heading">Maksimum irradiance NASA referensi</text:p>
          </table:table-cell>
          <table:table-cell table:style-name="Table1.A1" office:value-type="string">
            <text:p text:style-name="Table_20_Contents">50.03 Wh/m² per jam</text:p>
          </table:table-cell>
        </table:table-row>
        <table:table-row>
          <table:table-cell table:style-name="Table1.A1" office:value-type="string">
            <text:p text:style-name="Table_20_Heading">Kesesuaian pola jam yang tersedia</text:p>
          </table:table-cell>
          <table:table-cell table:style-name="Table1.A1" office:value-type="string">
            <text:p text:style-name="Table_20_Contents">0.0%</text:p>
          </table:table-cell>
        </table:table-row>
        <table:table-row>
          <table:table-cell table:style-name="Table1.A1" office:value-type="string">
            <text:p text:style-name="Table_20_Heading">Status demo project</text:p>
          </table:table-cell>
          <table:table-cell table:style-name="Table1.A1" office:value-type="string">
            <text:p text:style-name="Table_20_Contents">BMKG_WEATHER_DEMO_MODE=true, sehingga simulator dapat menghasilkan daya panel untuk kebutuhan presentasi walaupun timestamp berada di luar jam efektif matahari.</text:p>
          </table:table-cell>
        </table:table-row>
      </table:table>
      <text:h text:style-name="Heading_20_2" text:outline-level="2">Metode Perbandingan</text:h>
      <text:p text:style-name="Text_20_body">Project SCC ini menghasilkan data simulasi panel berupa <text:span text:style-name="Source_20_Text">Vpv</text:span> dan <text:span text:style-name="Source_20_Text">Ipv</text:span>. Daya panel simulasi dihitung dengan rumus <text:span text:style-name="Source_20_Text">Ppanel = Vpv × Ipv</text:span>. Nilai tersebut dibandingkan dengan data radiasi matahari publik NASA POWER, yaitu <text:span text:style-name="Source_20_Text">ALLSKY_SFC_SW_DWN</text:span>.</text:p>
      <text:p text:style-name="Text_20_body">Karena data SCC di project adalah demo tahun 2026 dan NASA POWER belum menyediakan nilai irradiance hourly yang valid untuk tanggal tersebut, laporan ini memakai tanggal kalender yang sama pada tahun 2025 sebagai baseline historis. Perbandingan difokuskan pada pola, bukan kalibrasi absolut: saat irradiance tinggi, daya panel simulasi seharusnya tinggi; saat irradiance nol/rendah, daya panel seharusnya rendah.</text:p>
      <text:p text:style-name="Text_20_body">Catatan penting: data project yang tersedia pada database saat laporan dibuat berada pada pukul 02:00-06:00 WIB. Pada jam tersebut, data NASA menunjukkan irradiance nol atau sangat rendah. Karena project sedang berjalan dalam mode demo, simulator masih dapat membuat daya panel puluhan watt agar dashboard presentasi tetap bergerak. Hal ini membuat perbandingan timestamp langsung menunjukkan ketidaksesuaian, tetapi sekaligus menjadi bukti batasan simulasi yang perlu dijelaskan saat UAS.</text:p>
      <text:h text:style-name="Heading_20_2" text:outline-level="2">Tabel Perbandingan per Jam</text:h>
      <text:p text:style-name="Text_20_body">Tabel dibuat ringkas agar mudah dibaca di dokumen. Detail fase, cloud, suhu, dan interpretasi ditulis setelah tabel.</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2"/>
        <table:table-column table:style-name="Table2.H"/>
        <table:table-header-rows>
          <table:table-row>
            <table:table-cell table:style-name="Table2.A1" office:value-type="string">
              <text:p text:style-name="Table_20_Heading">No</text:p>
            </table:table-cell>
            <table:table-cell table:style-name="Table2.A1" office:value-type="string">
              <text:p text:style-name="Table_20_Heading">Waktu Project</text:p>
            </table:table-cell>
            <table:table-cell table:style-name="Table2.A1" office:value-type="string">
              <text:p text:style-name="Table_20_Heading">NASA Referensi</text:p>
            </table:table-cell>
            <table:table-cell table:style-name="Table2.A1" office:value-type="string">
              <text:p text:style-name="Table_20_Heading">Sampel</text:p>
            </table:table-cell>
            <table:table-cell table:style-name="Table2.A1" office:value-type="string">
              <text:p text:style-name="Table_20_Heading">Ppanel Simulasi</text:p>
            </table:table-cell>
            <table:table-cell table:style-name="Table2.A1" office:value-type="string">
              <text:p text:style-name="Table_20_Heading">SoC</text:p>
            </table:table-cell>
            <table:table-cell table:style-name="Table2.A1" office:value-type="string">
              <text:p text:style-name="Table_20_Heading">Duty</text:p>
            </table:table-cell>
            <table:table-cell table:style-name="Table2.A1" office:value-type="string">
              <text:p text:style-name="Table_20_Heading">Irradiance NASA</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12 May 2026 05:00 WIB</text:p>
          </table:table-cell>
          <table:table-cell table:style-name="Table2.A1" office:value-type="string">
            <text:p text:style-name="Table_20_Contents">12 May 2025 05:00 WIB</text:p>
          </table:table-cell>
          <table:table-cell table:style-name="Table2.A1" office:value-type="string">
            <text:p text:style-name="Table_20_Contents">16</text:p>
          </table:table-cell>
          <table:table-cell table:style-name="Table2.A1" office:value-type="string">
            <text:p text:style-name="Table_20_Contents">38.15 W</text:p>
          </table:table-cell>
          <table:table-cell table:style-name="Table2.A1" office:value-type="string">
            <text:p text:style-name="Table_20_Contents">33.83%</text:p>
          </table:table-cell>
          <table:table-cell table:style-name="Table2.A1" office:value-type="string">
            <text:p text:style-name="Table_20_Contents">72.59%</text:p>
          </table:table-cell>
          <table:table-cell table:style-name="Table2.A1" office:value-type="string">
            <text:p text:style-name="Table_20_Contents">0.00 Wh/m²</text:p>
          </table:table-cell>
        </table:table-row>
        <table:table-row>
          <table:table-cell table:style-name="Table2.A1" office:value-type="string">
            <text:p text:style-name="Table_20_Contents">2</text:p>
          </table:table-cell>
          <table:table-cell table:style-name="Table2.A1" office:value-type="string">
            <text:p text:style-name="Table_20_Contents">12 May 2026 06:00 WIB</text:p>
          </table:table-cell>
          <table:table-cell table:style-name="Table2.A1" office:value-type="string">
            <text:p text:style-name="Table_20_Contents">12 May 2025 06:00 WIB</text:p>
          </table:table-cell>
          <table:table-cell table:style-name="Table2.A1" office:value-type="string">
            <text:p text:style-name="Table_20_Contents">132</text:p>
          </table:table-cell>
          <table:table-cell table:style-name="Table2.A1" office:value-type="string">
            <text:p text:style-name="Table_20_Contents">35.21 W</text:p>
          </table:table-cell>
          <table:table-cell table:style-name="Table2.A1" office:value-type="string">
            <text:p text:style-name="Table_20_Contents">76.52%</text:p>
          </table:table-cell>
          <table:table-cell table:style-name="Table2.A1" office:value-type="string">
            <text:p text:style-name="Table_20_Contents">46.47%</text:p>
          </table:table-cell>
          <table:table-cell table:style-name="Table2.A1" office:value-type="string">
            <text:p text:style-name="Table_20_Contents">50.03 Wh/m²</text:p>
          </table:table-cell>
        </table:table-row>
        <table:table-row>
          <table:table-cell table:style-name="Table2.A1" office:value-type="string">
            <text:p text:style-name="Table_20_Contents">3</text:p>
          </table:table-cell>
          <table:table-cell table:style-name="Table2.A1" office:value-type="string">
            <text:p text:style-name="Table_20_Contents">15 May 2026 02:00 WIB</text:p>
          </table:table-cell>
          <table:table-cell table:style-name="Table2.A1" office:value-type="string">
            <text:p text:style-name="Table_20_Contents">15 May 2025 02:00 WIB</text:p>
          </table:table-cell>
          <table:table-cell table:style-name="Table2.A1" office:value-type="string">
            <text:p text:style-name="Table_20_Contents">2</text:p>
          </table:table-cell>
          <table:table-cell table:style-name="Table2.A1" office:value-type="string">
            <text:p text:style-name="Table_20_Contents">35.98 W</text:p>
          </table:table-cell>
          <table:table-cell table:style-name="Table2.A1" office:value-type="string">
            <text:p text:style-name="Table_20_Contents">64.72%</text:p>
          </table:table-cell>
          <table:table-cell table:style-name="Table2.A1" office:value-type="string">
            <text:p text:style-name="Table_20_Contents">70.00%</text:p>
          </table:table-cell>
          <table:table-cell table:style-name="Table2.A1" office:value-type="string">
            <text:p text:style-name="Table_20_Contents">0.00 Wh/m²</text:p>
          </table:table-cell>
        </table:table-row>
        <table:table-row>
          <table:table-cell table:style-name="Table2.A1" office:value-type="string">
            <text:p text:style-name="Table_20_Contents">4</text:p>
          </table:table-cell>
          <table:table-cell table:style-name="Table2.A1" office:value-type="string">
            <text:p text:style-name="Table_20_Contents">15 May 2026 03:00 WIB</text:p>
          </table:table-cell>
          <table:table-cell table:style-name="Table2.A1" office:value-type="string">
            <text:p text:style-name="Table_20_Contents">15 May 2025 03:00 WIB</text:p>
          </table:table-cell>
          <table:table-cell table:style-name="Table2.A1" office:value-type="string">
            <text:p text:style-name="Table_20_Contents">12</text:p>
          </table:table-cell>
          <table:table-cell table:style-name="Table2.A1" office:value-type="string">
            <text:p text:style-name="Table_20_Contents">43.89 W</text:p>
          </table:table-cell>
          <table:table-cell table:style-name="Table2.A1" office:value-type="string">
            <text:p text:style-name="Table_20_Contents">82.21%</text:p>
          </table:table-cell>
          <table:table-cell table:style-name="Table2.A1" office:value-type="string">
            <text:p text:style-name="Table_20_Contents">45.52%</text:p>
          </table:table-cell>
          <table:table-cell table:style-name="Table2.A1" office:value-type="string">
            <text:p text:style-name="Table_20_Contents">0.00 Wh/m²</text:p>
          </table:table-cell>
        </table:table-row>
      </table:table>
      <text:h text:style-name="Heading_20_2" text:outline-level="2">Detail Interpretasi per Jam</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No</text:p>
            </table:table-cell>
            <table:table-cell table:style-name="Table3.A1" office:value-type="string">
              <text:p text:style-name="Table_20_Heading">Parameter Project</text:p>
            </table:table-cell>
            <table:table-cell table:style-name="Table3.A1" office:value-type="string">
              <text:p text:style-name="Table_20_Heading">Parameter NASA</text:p>
            </table:table-cell>
            <table:table-cell table:style-name="Table3.A1" office:value-type="string">
              <text:p text:style-name="Table_20_Heading">Interpretasi</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Vpv 18.75 V; Ipv 2.03 A; fase Bulk.</text:p>
          </table:table-cell>
          <table:table-cell table:style-name="Table3.A1" office:value-type="string">
            <text:p text:style-name="Table_20_Contents">Cloud 99.17%; suhu 18.46 °C.</text:p>
          </table:table-cell>
          <table:table-cell table:style-name="Table3.A1" office:value-type="string">
            <text:p text:style-name="Table_20_Contents">Tidak sesuai: irradiance rendah/nol tetapi simulasi masih menghasilkan daya panel. Ini indikasi efek demo mode atau timestamp tidak representatif.</text:p>
          </table:table-cell>
        </table:table-row>
        <table:table-row>
          <table:table-cell table:style-name="Table3.A1" office:value-type="string">
            <text:p text:style-name="Table_20_Contents">2</text:p>
          </table:table-cell>
          <table:table-cell table:style-name="Table3.A1" office:value-type="string">
            <text:p text:style-name="Table_20_Contents">Vpv 17.28 V; Ipv 1.84 A; fase Bulk,Absorption,Float,Standby.</text:p>
          </table:table-cell>
          <table:table-cell table:style-name="Table3.A1" office:value-type="string">
            <text:p text:style-name="Table_20_Contents">Cloud 97.73%; suhu 19.34 °C.</text:p>
          </table:table-cell>
          <table:table-cell table:style-name="Table3.A1" office:value-type="string">
            <text:p text:style-name="Table_20_Contents">Cukup sesuai: pola tidak bertentangan, tetapi nilai berada di area transisi.</text:p>
          </table:table-cell>
        </table:table-row>
        <table:table-row>
          <table:table-cell table:style-name="Table3.A1" office:value-type="string">
            <text:p text:style-name="Table_20_Contents">3</text:p>
          </table:table-cell>
          <table:table-cell table:style-name="Table3.A1" office:value-type="string">
            <text:p text:style-name="Table_20_Contents">Vpv 17.41 V; Ipv 2.06 A; fase Bulk.</text:p>
          </table:table-cell>
          <table:table-cell table:style-name="Table3.A1" office:value-type="string">
            <text:p text:style-name="Table_20_Contents">Cloud 89.36%; suhu 20.13 °C.</text:p>
          </table:table-cell>
          <table:table-cell table:style-name="Table3.A1" office:value-type="string">
            <text:p text:style-name="Table_20_Contents">Tidak sesuai: irradiance rendah/nol tetapi simulasi masih menghasilkan daya panel. Ini indikasi efek demo mode atau timestamp tidak representatif.</text:p>
          </table:table-cell>
        </table:table-row>
        <table:table-row>
          <table:table-cell table:style-name="Table3.A1" office:value-type="string">
            <text:p text:style-name="Table_20_Contents">4</text:p>
          </table:table-cell>
          <table:table-cell table:style-name="Table3.A1" office:value-type="string">
            <text:p text:style-name="Table_20_Contents">Vpv 17.97 V; Ipv 2.43 A; fase Bulk,Absorption,Float.</text:p>
          </table:table-cell>
          <table:table-cell table:style-name="Table3.A1" office:value-type="string">
            <text:p text:style-name="Table_20_Contents">Cloud 96.41%; suhu 19.66 °C.</text:p>
          </table:table-cell>
          <table:table-cell table:style-name="Table3.A1" office:value-type="string">
            <text:p text:style-name="Table_20_Contents">Tidak sesuai: irradiance rendah/nol tetapi simulasi masih menghasilkan daya panel. Ini indikasi efek demo mode atau timestamp tidak representatif.</text:p>
          </table:table-cell>
        </table:table-row>
      </table:table>
      <text:h text:style-name="Heading_20_2" text:outline-level="2">Analisis</text:h>
      <text:p text:style-name="Text_20_body">Secara umum, data project menunjukkan daya panel simulasi berada pada kisaran 43.89 W maksimum. Namun pada timestamp yang sama, NASA POWER menunjukkan irradiance nol atau rendah. Artinya, data demo yang sedang tersimpan belum cocok untuk disebut sebagai validasi waktu nyata terhadap radiasi matahari. Perbedaan ini muncul karena mode demo project sengaja mempertahankan simulasi panel agar dashboard tetap aktif untuk presentasi.</text:p>
      <text:p text:style-name="Text_20_body">Nilai numerik antara NASA irradiance dan Ppanel simulasi tidak harus sama karena satuannya berbeda. NASA memberikan energi radiasi per luas permukaan horizontal, sedangkan project menghitung daya keluaran panel dari model simulasi tegangan dan arus. Oleh karena itu laporan ini membaca kesesuaian tren, bukan error absolut.</text:p>
      <text:p text:style-name="Text_20_body">Jika ingin memperoleh validasi yang lebih kuat, data SCC perlu direkam pada jam siang lokal, misalnya pukul 08:00-15:00 WIB, atau demo mode perlu dimatikan agar logika siang/malam benar-benar menahan produksi panel pada malam hari.</text:p>
      <text:h text:style-name="Heading_20_2" text:outline-level="2">Keterbatasan</text:h>
      <text:list text:style-name="L1">
        <text:list-item>
          <text:p text:style-name="P2">Data NASA yang dipakai adalah baseline historis 2025 karena data irradiance NASA untuk tanggal demo 2026 masih bernilai <text:span text:style-name="Source_20_Text">-999</text:span> atau belum tersedia.</text:p>
        </text:list-item>
        <text:list-item>
          <text:p text:style-name="P2">Simulasi project memakai tutupan awan BMKG dan logika siang/malam, tetapi pada saat laporan dibuat mode demo aktif sehingga pengaruh malam hari tidak dipakai secara ketat.</text:p>
        </text:list-item>
        <text:list-item>
          <text:p text:style-name="P3">Perbandingan ini adalah plausibility check. Untuk validasi hardware penuh tetap diperlukan pengukuran real Vpv, Ipv, irradiance, suhu panel, dan orientasi panel.</text:p>
        </text:list-item>
      </text:list>
      <text:h text:style-name="Heading_20_2" text:outline-level="2">Kesimpulan</text:h>
      <text:p text:style-name="Text_20_body">Perbandingan dengan NASA POWER menunjukkan bahwa data demo project belum valid sebagai pembacaan waktu nyata karena daya panel simulasi masih muncul pada jam ketika irradiance referensi rendah atau nol. Namun, hasil ini tetap berguna untuk laporan UAS karena menunjukkan batasan simulasi secara transparan. Project layak dipakai sebagai demonstrasi hubungan cuaca, potensi panel, fuzzy charging, dan manajemen beban DC, dengan catatan bahwa validasi lapangan tetap memerlukan data siang hari atau sensor irradiance real.</text:p>
      <text:h text:style-name="Heading_20_2" text:outline-level="2">Sumber Data</text:h>
      <text:list text:style-name="L2">
        <text:list-item>
          <text:p text:style-name="P4">NASA POWER Hourly API: https://power.larc.nasa.gov/docs/services/api/temporal/hourly/</text:p>
        </text:list-item>
        <text:list-item>
          <text:p text:style-name="P4">NASA POWER Solar FAQ: https://power.larc.nasa.gov/docs/faqs/solar/</text:p>
        </text:list-item>
        <text:list-item>
          <text:p text:style-name="P5">NASA POWER Methodology CERES SYN1deg: https://power.larc.nasa.gov/docs/methodology/energy-fluxes/syn1deg/</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5%"/>
      <style:text-properties fo:color="#111827" loext:opacity="100%" style:font-name="Arial" fo:font-family="Arial, Helvetica, sans-serif" fo:font-size="10.5pt" style:font-name-asian="Arial" style:font-family-asian="Arial, Helvetica, sans-serif" style:font-size-asian="10.5pt" style:font-name-complex="Arial" style:font-family-complex="Arial, Helvetica, sans-serif" style:font-size-complex="10.5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left" style:justify-single-word="false"/>
    </style:style>
    <style:style style:name="Heading_20_1" style:display-name="Heading 1" style:family="paragraph" style:parent-style-name="Heading" style:next-style-name="Text_20_body" style:class="chapter">
      <style:paragraph-properties fo:margin-top="0.1665in" fo:margin-bottom="0.1252in" style:contextual-spacing="false" fo:padding-left="0in" fo:padding-right="0in" fo:padding-top="0in" fo:padding-bottom="0.0835in" fo:border-left="none" fo:border-right="none" fo:border-top="none" fo:border-bottom="1.5pt solid #1f2937"/>
      <style:text-properties fo:font-size="20pt" fo:font-weight="bold" style:font-size-asian="20pt" style:font-weight-asian="bold" style:font-size-complex="20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chapter">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chapter">
      <style:paragraph-properties fo:margin-left="0.2291in" fo:margin-right="0.2291in" fo:margin-top="0.2291in" fo:margin-bottom="0.0835in" style:contextual-spacing="false"/>
      <style:text-properties fo:color="#1f2937" loext:opacity="100%" style:font-name="Liberation Serif" fo:font-family="'Liberation Serif'" style:font-family-generic="roman" style:font-pitch="variable" fo:font-size="15pt" fo:font-weight="bold" style:font-name-asian="Noto Serif CJK SC" style:font-family-asian="'Noto Serif CJK SC'" style:font-family-generic-asian="system" style:font-pitch-asian="variable" style:font-size-asian="15pt" style:font-weight-asian="bold" style:font-name-complex="Noto Sans Devanagari1" style:font-family-complex="'Noto Sans Devanagari'" style:font-family-generic-complex="system" style:font-pitch-complex="variable" style:font-size-complex="15pt" style:font-weight-complex="bold"/>
    </style:style>
    <style:style style:name="Body_20_Text.meta" style:display-name="Body Text.meta" style:family="paragraph" style:parent-style-name="Text_20_body">
      <style:paragraph-properties fo:padding-left="0.1252in" fo:padding-right="0in" fo:padding-top="0in" fo:padding-bottom="0in" fo:border-left="3pt solid #2563eb" fo:border-right="none" fo:border-top="none" fo:border-bottom="none"/>
    </style:style>
    <style:style style:name="Table_20_Heading" style:display-name="Table Heading" style:family="paragraph" style:parent-style-name="Table_20_Contents" style:class="extra">
      <style:paragraph-properties fo:text-align="left" style:justify-single-word="false" text:number-lines="false" text:line-number="0"/>
      <style:text-properties fo:font-weight="bold" style:font-weight-asian="bold" style:font-weight-complex="bol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fo:color="#1e3a8a" loext:opacity="100%" style:font-name="Liberation Mono" fo:font-family="'Liberation Mono'" style:font-family-generic="modern" style:font-pitch="fixed" fo:background-color="#eef2ff"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083in" fo:margin-bottom="0.7083in" fo:margin-left="0.5516in" fo:margin-right="0.5516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Laporan Validasi Simulasi SCC</dc:title>
    <meta:document-statistic meta:table-count="3" meta:image-count="0" meta:object-count="0" meta:page-count="1" meta:paragraph-count="102" meta:word-count="827" meta:character-count="5645" meta:non-whitespace-character-count="4932"/>
    <meta:generator>LibreOffice/26.2.3.2$Linux_X86_64 LibreOffice_project/620$Build-2</meta:generator>
    <meta:user-defined meta:name=""/>
  </office:meta>
</office:document-meta>
</file>